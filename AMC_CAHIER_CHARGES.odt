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3CE0000030F8B6BF19E.png" manifest:media-type="image/png"/>
  <manifest:file-entry manifest:full-path="Pictures/10000001000005190000032AA594795B.png" manifest:media-type="image/png"/>
  <manifest:file-entry manifest:full-path="Pictures/100000000000040A0000010758031FF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padding="0cm" fo:border="none"/>
    </style:style>
    <style:style style:name="P2" style:family="paragraph" style:parent-style-name="Standard">
      <style:paragraph-properties fo:margin-top="0.106cm" fo:margin-bottom="0.106cm" style:contextual-spacing="false" fo:text-align="justify" style:justify-single-word="false"/>
      <style:text-properties officeooo:paragraph-rsid="0019f5da"/>
    </style:style>
    <style:style style:name="P3" style:family="paragraph" style:parent-style-name="Bibliographie1">
      <style:paragraph-properties fo:text-align="start" style:justify-single-word="false"/>
      <style:text-properties fo:language="fr" fo:country="FR" fo:font-weight="normal" style:font-weight-asian="normal" style:font-name-complex="Arial1" style:font-weight-complex="normal"/>
    </style:style>
    <style:style style:name="P4" style:family="paragraph" style:parent-style-name="Footer">
      <style:paragraph-properties fo:margin-left="-1.251cm" fo:margin-right="0.635cm">
        <style:tab-stops>
          <style:tab-stop style:position="8.001cm" style:type="center"/>
        </style:tab-stops>
      </style:paragraph-properties>
      <style:text-properties style:font-name="Arial Narrow" fo:font-size="8pt" style:font-size-asian="8pt" style:font-size-complex="8pt"/>
    </style:style>
    <style:style style:name="P5" style:family="paragraph" style:parent-style-name="Header">
      <style:paragraph-properties fo:margin-left="-1cm" fo:margin-top="0.106cm" fo:margin-bottom="0cm" style:contextual-spacing="false">
        <style:tab-stops>
          <style:tab-stop style:position="8.001cm" style:type="center"/>
          <style:tab-stop style:position="17.002cm" style:type="right"/>
        </style:tab-stops>
      </style:paragraph-properties>
    </style:style>
    <style:style style:name="P6" style:family="paragraph" style:parent-style-name="Header">
      <style:paragraph-properties fo:margin-top="0cm" fo:margin-bottom="0.106cm" style:contextual-spacing="false">
        <style:tab-stops>
          <style:tab-stop style:position="8.001cm" style:type="center"/>
          <style:tab-stop style:position="17.002cm" style:type="right"/>
        </style:tab-stops>
      </style:paragraph-properties>
    </style:style>
    <style:style style:name="P7"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paragraph-rsid="002820ce" style:font-name-asian="Arial1" style:font-name-complex="Arial1" style:font-size-complex="11pt"/>
    </style:style>
    <style:style style:name="P8"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paragraph-rsid="002a2679" style:font-name-asian="Arial1" style:font-name-complex="Arial1" style:font-size-complex="11pt"/>
    </style:style>
    <style:style style:name="P9"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paragraph-rsid="003001e8" style:font-name-asian="Arial1" style:font-name-complex="Arial1" style:font-size-complex="11pt"/>
    </style:style>
    <style:style style:name="P10" style:family="paragraph" style:parent-style-name="List_20_Paragraph">
      <style:paragraph-properties fo:margin-top="0cm" fo:margin-bottom="0cm" style:contextual-spacing="false" fo:text-align="justify" style:justify-single-word="false" style:punctuation-wrap="simple" style:vertical-align="auto"/>
      <style:text-properties style:font-name-asian="Arial1" style:font-name-complex="Arial1" style:font-size-complex="11pt"/>
    </style:style>
    <style:style style:name="P11" style:family="paragraph" style:parent-style-name="List_20_Paragraph">
      <style:paragraph-properties fo:margin-top="0cm" fo:margin-bottom="0cm" style:contextual-spacing="false" fo:text-align="justify" style:justify-single-word="false" style:punctuation-wrap="simple" style:vertical-align="auto"/>
      <style:text-properties officeooo:paragraph-rsid="002574aa" style:font-name-asian="Arial1" style:font-name-complex="Arial1" style:font-size-complex="11pt"/>
    </style:style>
    <style:style style:name="P12"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820ce" officeooo:paragraph-rsid="002820ce" style:font-name-asian="Arial1" style:font-name-complex="Arial1" style:font-size-complex="11pt"/>
    </style:style>
    <style:style style:name="P13"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820ce" officeooo:paragraph-rsid="003001e8" style:font-name-asian="Arial1" style:font-name-complex="Arial1" style:font-size-complex="11pt"/>
    </style:style>
    <style:style style:name="P14"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paragraph-rsid="002820ce"/>
    </style:style>
    <style:style style:name="P15"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paragraph-rsid="003001e8"/>
    </style:style>
    <style:style style:name="P16" style:family="paragraph" style:parent-style-name="List_20_Paragraph">
      <style:paragraph-properties fo:margin-top="0cm" fo:margin-bottom="0cm" style:contextual-spacing="false" fo:text-align="justify" style:justify-single-word="false" style:punctuation-wrap="simple" style:vertical-align="auto"/>
      <style:text-properties fo:color="#000000" loext:opacity="100%" officeooo:rsid="002574aa" style:font-weight-complex="bold">
        <loext:char-complex-color loext:theme-type="dark1" loext:color-type="theme"/>
      </style:text-properties>
    </style:style>
    <style:style style:name="P17" style:family="paragraph" style:parent-style-name="List_20_Paragraph">
      <style:paragraph-properties fo:margin-top="0cm" fo:margin-bottom="0cm" style:contextual-spacing="false" fo:text-align="justify" style:justify-single-word="false" style:punctuation-wrap="simple" style:vertical-align="auto"/>
      <style:text-properties fo:font-weight="bold" style:font-weight-asian="bold" style:font-weight-complex="bold"/>
    </style:style>
    <style:style style:name="P18" style:family="paragraph" style:parent-style-name="List_20_Paragraph">
      <style:paragraph-properties fo:margin-top="0cm" fo:margin-bottom="0cm" style:contextual-spacing="false" fo:text-align="center" style:justify-single-word="false" style:punctuation-wrap="simple" style:vertical-align="auto"/>
      <style:text-properties fo:font-weight="bold" officeooo:rsid="002820ce" officeooo:paragraph-rsid="002820ce" style:font-weight-asian="bold" style:font-weight-complex="bold"/>
    </style:style>
    <style:style style:name="P19" style:family="paragraph" style:parent-style-name="List_20_Paragraph" style:list-style-name="WWNum16">
      <style:paragraph-properties fo:margin-top="0cm" fo:margin-bottom="0cm" style:contextual-spacing="false" fo:text-align="center" style:justify-single-word="false" style:punctuation-wrap="simple" style:vertical-align="auto"/>
      <style:text-properties fo:font-weight="bold" officeooo:rsid="002820ce" officeooo:paragraph-rsid="003001e8" style:font-weight-asian="bold" style:font-weight-complex="bold"/>
    </style:style>
    <style:style style:name="P20"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820ce" officeooo:paragraph-rsid="002820ce"/>
    </style:style>
    <style:style style:name="P21"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820ce" officeooo:paragraph-rsid="003001e8"/>
    </style:style>
    <style:style style:name="P22"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89d0c" officeooo:paragraph-rsid="003001e8"/>
    </style:style>
    <style:style style:name="P23" style:family="paragraph" style:parent-style-name="List_20_Paragraph">
      <style:paragraph-properties fo:margin-top="0cm" fo:margin-bottom="0cm" style:contextual-spacing="false" fo:text-align="justify" style:justify-single-word="false" style:punctuation-wrap="simple" style:vertical-align="auto"/>
      <style:text-properties officeooo:rsid="00289d0c" officeooo:paragraph-rsid="00289d0c"/>
    </style:style>
    <style:style style:name="P24"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ce052" officeooo:paragraph-rsid="002ce052"/>
    </style:style>
    <style:style style:name="P25"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2ce052" officeooo:paragraph-rsid="003001e8"/>
    </style:style>
    <style:style style:name="P26" style:family="paragraph" style:parent-style-name="List_20_Paragraph" style:list-style-name="WWNum16">
      <style:paragraph-properties fo:margin-top="0cm" fo:margin-bottom="0cm" style:contextual-spacing="false" fo:text-align="justify" style:justify-single-word="false" style:punctuation-wrap="simple" style:vertical-align="auto"/>
      <style:text-properties officeooo:rsid="003001e8" officeooo:paragraph-rsid="003001e8"/>
    </style:style>
    <style:style style:name="P27" style:family="paragraph" style:parent-style-name="Standard" style:master-page-name="Standard">
      <style:paragraph-properties style:page-number="auto"/>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paragraph-rsid="002574aa" style:font-weight-asian="bold" style:font-weight-complex="bold"/>
    </style:style>
    <style:style style:name="P29" style:family="paragraph" style:parent-style-name="Standard">
      <style:paragraph-properties fo:margin-top="0.106cm" fo:margin-bottom="0.106cm" style:contextual-spacing="false"/>
      <style:text-properties officeooo:paragraph-rsid="002574aa"/>
    </style:style>
    <style:style style:name="P30" style:family="paragraph" style:parent-style-name="Standard">
      <style:paragraph-properties fo:margin-top="0.106cm" fo:margin-bottom="0.106cm" style:contextual-spacing="false" fo:text-align="center" style:justify-single-word="false" fo:padding-left="0.141cm" fo:padding-right="0.141cm" fo:padding-top="0.035cm" fo:padding-bottom="0.035cm" fo:border="0.51pt solid #000000" style:shadow="none"/>
    </style:style>
    <style:style style:name="P31" style:family="paragraph" style:parent-style-name="Standard">
      <style:paragraph-properties fo:text-align="center" style:justify-single-word="false"/>
      <style:text-properties officeooo:paragraph-rsid="002574aa"/>
    </style:style>
    <style:style style:name="P32" style:family="paragraph" style:parent-style-name="Standard">
      <style:paragraph-properties fo:margin-top="0.106cm" fo:margin-bottom="0.106cm" style:contextual-spacing="false" fo:text-align="center" style:justify-single-word="false" fo:text-indent="0cm" style:auto-text-indent="false"/>
      <style:text-properties officeooo:paragraph-rsid="002574aa"/>
    </style:style>
    <style:style style:name="P33" style:family="paragraph" style:parent-style-name="Standard">
      <style:paragraph-properties fo:text-align="center" style:justify-single-word="false" fo:text-indent="0cm" style:auto-text-indent="false"/>
      <style:text-properties officeooo:paragraph-rsid="002574aa"/>
    </style:style>
    <style:style style:name="P34" style:family="paragraph" style:parent-style-name="Standard">
      <style:paragraph-properties fo:margin-top="0.106cm" fo:margin-bottom="0.106cm" style:contextual-spacing="false" fo:text-align="center" style:justify-single-word="false"/>
      <style:text-properties officeooo:paragraph-rsid="002820ce"/>
    </style:style>
    <style:style style:name="P35" style:family="paragraph" style:parent-style-name="Standard">
      <style:paragraph-properties fo:text-align="center" style:justify-single-word="false">
        <style:tab-stops>
          <style:tab-stop style:position="11.753cm"/>
        </style:tab-stops>
      </style:paragraph-properties>
      <style:text-properties officeooo:paragraph-rsid="001f9b66"/>
    </style:style>
    <style:style style:name="P36" style:family="paragraph" style:parent-style-name="Standard" style:list-style-name="WWNum16">
      <style:paragraph-properties fo:margin-top="0.106cm" fo:margin-bottom="0.106cm" style:contextual-spacing="false" fo:text-align="center" style:justify-single-word="false"/>
      <style:text-properties officeooo:paragraph-rsid="003001e8"/>
    </style:style>
    <style:style style:name="P37" style:family="paragraph" style:parent-style-name="Standard">
      <style:paragraph-properties fo:margin-top="0.106cm" fo:margin-bottom="0.106cm" style:contextual-spacing="false" fo:text-align="center" style:justify-single-word="false" fo:padding-left="0.141cm" fo:padding-right="0.141cm" fo:padding-top="0.035cm" fo:padding-bottom="0.035cm" fo:border="0.51pt solid #000000" style:shadow="none"/>
      <style:text-properties officeooo:rsid="001f9b66" officeooo:paragraph-rsid="001f9b66"/>
    </style:style>
    <style:style style:name="P38" style:family="paragraph" style:parent-style-name="Standard">
      <style:paragraph-properties>
        <style:tab-stops>
          <style:tab-stop style:position="11.753cm"/>
        </style:tab-stops>
      </style:paragraph-properties>
      <style:text-properties officeooo:paragraph-rsid="001f9b66"/>
    </style:style>
    <style:style style:name="P39" style:family="paragraph" style:parent-style-name="Standard">
      <style:paragraph-properties fo:margin-top="0.106cm" fo:margin-bottom="0.106cm" style:contextual-spacing="false" fo:text-align="justify" style:justify-single-word="false"/>
      <style:text-properties officeooo:paragraph-rsid="0012c843"/>
    </style:style>
    <style:style style:name="P40" style:family="paragraph" style:parent-style-name="Standard">
      <style:paragraph-properties fo:margin-top="0.106cm" fo:margin-bottom="0.106cm" style:contextual-spacing="false" fo:text-align="justify" style:justify-single-word="false"/>
    </style:style>
    <style:style style:name="P41" style:family="paragraph" style:parent-style-name="Standard">
      <style:paragraph-properties fo:margin-top="0cm" fo:margin-bottom="0.106cm" style:contextual-spacing="false" fo:text-align="justify" style:justify-single-word="false" fo:break-before="page"/>
    </style:style>
    <style:style style:name="P42" style:family="paragraph" style:parent-style-name="Standard">
      <style:paragraph-properties fo:margin-top="0.106cm" fo:margin-bottom="0.106cm" style:contextual-spacing="false" fo:text-align="justify" style:justify-single-word="false"/>
      <style:text-properties officeooo:paragraph-rsid="002574aa"/>
    </style:style>
    <style:style style:name="P43" style:family="paragraph" style:parent-style-name="Standard">
      <style:paragraph-properties fo:margin-top="0.106cm" fo:margin-bottom="0.106cm" style:contextual-spacing="false" fo:text-align="justify" style:justify-single-word="false"/>
      <style:text-properties officeooo:paragraph-rsid="0019f5da"/>
    </style:style>
    <style:style style:name="P44" style:family="paragraph" style:parent-style-name="Standard">
      <style:paragraph-properties fo:margin-top="0.106cm" fo:margin-bottom="0.106cm" style:contextual-spacing="false" fo:text-align="justify" style:justify-single-word="false"/>
      <style:text-properties officeooo:paragraph-rsid="003001e8"/>
    </style:style>
    <style:style style:name="P45" style:family="paragraph" style:parent-style-name="Standard">
      <style:paragraph-properties fo:margin-top="0.106cm" fo:margin-bottom="0.106cm" style:contextual-spacing="false" fo:text-align="justify" style:justify-single-word="false" fo:text-indent="1.249cm" style:auto-text-indent="false"/>
      <style:text-properties fo:language="de" fo:country="CH" fo:font-weight="bold" officeooo:paragraph-rsid="002574aa" style:font-weight-asian="bold" style:font-weight-complex="bold"/>
    </style:style>
    <style:style style:name="P46" style:family="paragraph" style:parent-style-name="Standard">
      <style:paragraph-properties fo:margin-top="0.106cm" fo:margin-bottom="0.106cm" style:contextual-spacing="false" fo:text-align="justify" style:justify-single-word="false" fo:text-indent="0cm" style:auto-text-indent="false"/>
      <style:text-properties fo:language="de" fo:country="CH" fo:font-weight="bold" officeooo:paragraph-rsid="002574aa" style:font-weight-asian="bold" style:font-weight-complex="bold"/>
    </style:style>
    <style:style style:name="P47" style:family="paragraph" style:parent-style-name="Standard">
      <style:paragraph-properties fo:text-align="start" style:justify-single-word="false"/>
      <style:text-properties fo:language="de" fo:country="CH" fo:font-weight="bold" officeooo:rsid="002574aa" officeooo:paragraph-rsid="002574aa" style:font-weight-asian="bold" style:font-weight-complex="bold"/>
    </style:style>
    <style:style style:name="P48" style:family="paragraph" style:parent-style-name="Standard">
      <style:paragraph-properties fo:margin-top="0.106cm" fo:margin-bottom="0.106cm" style:contextual-spacing="false" fo:text-align="justify" style:justify-single-word="false" fo:text-indent="0cm" style:auto-text-indent="false"/>
      <style:text-properties fo:language="de" fo:country="CH" fo:font-weight="bold" officeooo:rsid="00289d0c" officeooo:paragraph-rsid="00289d0c" style:font-weight-asian="bold" style:font-weight-complex="bold"/>
    </style:style>
    <style:style style:name="P49" style:family="paragraph" style:parent-style-name="Standard">
      <style:paragraph-properties fo:margin-top="0.106cm" fo:margin-bottom="0.106cm" style:contextual-spacing="false" fo:text-align="center" style:justify-single-word="false" fo:text-indent="1.249cm" style:auto-text-indent="false"/>
      <style:text-properties fo:language="de" fo:country="CH" fo:font-weight="bold" officeooo:rsid="00289d0c" officeooo:paragraph-rsid="00289d0c" style:font-weight-asian="bold" style:font-weight-complex="bold"/>
    </style:style>
    <style:style style:name="P50" style:family="paragraph" style:parent-style-name="Standard">
      <style:paragraph-properties fo:margin-top="0.106cm" fo:margin-bottom="0.106cm" style:contextual-spacing="false" fo:text-align="center" style:justify-single-word="false" fo:text-indent="0cm" style:auto-text-indent="false"/>
      <style:text-properties fo:language="de" fo:country="CH" fo:font-weight="bold" officeooo:rsid="00289d0c" officeooo:paragraph-rsid="00289d0c" style:font-weight-asian="bold" style:font-weight-complex="bold"/>
    </style:style>
    <style:style style:name="P51" style:family="paragraph" style:parent-style-name="Standard">
      <style:paragraph-properties fo:margin-top="0.106cm" fo:margin-bottom="0.106cm" style:contextual-spacing="false" fo:text-align="center" style:justify-single-word="false" fo:text-indent="1.249cm" style:auto-text-indent="false"/>
      <style:text-properties fo:language="de" fo:country="CH" fo:font-weight="bold" officeooo:paragraph-rsid="002b4f97" style:font-weight-asian="bold" style:font-weight-complex="bold"/>
    </style:style>
    <style:style style:name="P52" style:family="paragraph" style:parent-style-name="Standard">
      <style:paragraph-properties fo:margin-top="0.106cm" fo:margin-bottom="0.106cm" style:contextual-spacing="false" fo:text-align="justify" style:justify-single-word="false"/>
      <style:text-properties fo:color="#000000" loext:opacity="100%" style:font-weight-complex="bold">
        <loext:char-complex-color loext:theme-type="dark1" loext:color-type="theme"/>
      </style:text-properties>
    </style:style>
    <style:style style:name="P53" style:family="paragraph" style:parent-style-name="Standard">
      <style:paragraph-properties fo:margin-top="0.106cm" fo:margin-bottom="0.106cm" style:contextual-spacing="false" fo:text-align="justify" style:justify-single-word="false"/>
      <style:text-properties fo:color="#000000" loext:opacity="100%" officeooo:paragraph-rsid="002574aa" style:font-weight-complex="bold">
        <loext:char-complex-color loext:theme-type="dark1" loext:color-type="theme"/>
      </style:text-properties>
    </style:style>
    <style:style style:name="P54" style:family="paragraph" style:parent-style-name="Standard">
      <style:paragraph-properties fo:text-align="center" style:justify-single-word="false"/>
      <style:text-properties officeooo:rsid="002574aa" officeooo:paragraph-rsid="002574aa"/>
    </style:style>
    <style:style style:name="P55" style:family="paragraph" style:parent-style-name="Standard">
      <style:paragraph-properties fo:text-align="start" style:justify-single-word="false"/>
      <style:text-properties officeooo:rsid="002574aa" officeooo:paragraph-rsid="002574aa"/>
    </style:style>
    <style:style style:name="P56" style:family="paragraph" style:parent-style-name="Standard">
      <style:paragraph-properties fo:margin-top="0.106cm" fo:margin-bottom="0.106cm" style:contextual-spacing="false">
        <style:tab-stops>
          <style:tab-stop style:position="1.27cm"/>
        </style:tab-stops>
      </style:paragraph-properties>
      <style:text-properties officeooo:paragraph-rsid="0034016f" style:font-name-asian="Arial1" style:font-name-complex="Arial1" style:font-size-complex="11pt"/>
    </style:style>
    <style:style style:name="P57" style:family="paragraph" style:parent-style-name="Standard">
      <style:paragraph-properties fo:margin-top="0.106cm" fo:margin-bottom="0.106cm" style:contextual-spacing="false"/>
      <style:text-properties officeooo:paragraph-rsid="002820ce"/>
    </style:style>
    <style:style style:name="P58" style:family="paragraph" style:parent-style-name="Standard">
      <style:paragraph-properties fo:margin-top="0.106cm" fo:margin-bottom="0.106cm" style:contextual-spacing="false" fo:text-align="justify" style:justify-single-word="false"/>
      <style:text-properties officeooo:rsid="002b4f97" officeooo:paragraph-rsid="002b4f97"/>
    </style:style>
    <style:style style:name="P59" style:family="paragraph" style:parent-style-name="Standard">
      <style:paragraph-properties fo:margin-top="0.106cm" fo:margin-bottom="0.106cm" style:contextual-spacing="false">
        <style:tab-stops>
          <style:tab-stop style:position="1.27cm"/>
        </style:tab-stops>
      </style:paragraph-properties>
      <style:text-properties officeooo:paragraph-rsid="003001e8"/>
    </style:style>
    <style:style style:name="P60" style:family="paragraph" style:parent-style-name="Standard">
      <style:paragraph-properties fo:margin-top="0.106cm" fo:margin-bottom="0.106cm" style:contextual-spacing="false">
        <style:tab-stops>
          <style:tab-stop style:position="1.27cm"/>
        </style:tab-stops>
      </style:paragraph-properties>
    </style:style>
    <style:style style:name="T1" style:family="text">
      <style:text-properties fo:font-size="12pt" fo:font-weight="bold" style:font-size-asian="12pt" style:font-weight-asian="bold" style:font-weight-complex="bold"/>
    </style:style>
    <style:style style:name="T2" style:family="text">
      <style:text-properties style:font-name="Arial Narrow" fo:font-size="8pt" style:font-size-asian="8pt" style:font-size-complex="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574aa" style:font-weight-asian="bold" style:font-weight-complex="bold"/>
    </style:style>
    <style:style style:name="T6" style:family="text">
      <style:text-properties fo:font-weight="bold" officeooo:rsid="002820ce" style:font-weight-asian="bold" style:font-weight-complex="bold"/>
    </style:style>
    <style:style style:name="T7" style:family="text">
      <style:text-properties fo:font-weight="bold" officeooo:rsid="002820ce" style:font-weight-asian="bold"/>
    </style:style>
    <style:style style:name="T8" style:family="text">
      <style:text-properties fo:font-weight="bold" officeooo:rsid="0012c843" style:font-name-asian="Arial1" style:font-weight-asian="bold" style:font-name-complex="Arial1" style:font-size-complex="11pt" style:font-weight-complex="bold"/>
    </style:style>
    <style:style style:name="T9" style:family="text">
      <style:text-properties fo:font-variant="small-caps" fo:font-weight="bold" style:font-weight-asian="bold" style:font-weight-complex="bold"/>
    </style:style>
    <style:style style:name="T10" style:family="text">
      <style:text-properties fo:font-variant="small-caps" fo:color="#000000" loext:opacity="100%" fo:font-weight="bold" style:font-weight-asian="bold" style:font-weight-complex="bold">
        <loext:char-complex-color loext:theme-type="dark1" loext:color-type="theme"/>
      </style:text-properties>
    </style:style>
    <style:style style:name="T11" style:family="text">
      <style:text-properties fo:language="de" fo:country="CH"/>
    </style:style>
    <style:style style:name="T12" style:family="text">
      <style:text-properties fo:language="de" fo:country="CH" style:font-name-asian="Arial1" style:font-name-complex="Arial1" style:font-size-complex="11pt"/>
    </style:style>
    <style:style style:name="T13" style:family="text">
      <style:text-properties fo:language="de" fo:country="CH" officeooo:rsid="000eaeef" style:font-name-asian="Arial1" style:font-name-complex="Arial1" style:font-size-complex="11pt"/>
    </style:style>
    <style:style style:name="T14" style:family="text">
      <style:text-properties fo:language="de" fo:country="CH" officeooo:rsid="001f387f" style:font-name-asian="Arial1" style:font-name-complex="Arial1" style:font-size-complex="11pt"/>
    </style:style>
    <style:style style:name="T15" style:family="text">
      <style:text-properties fo:language="de" fo:country="CH" fo:font-weight="bold" style:font-weight-asian="bold" style:font-weight-complex="bold"/>
    </style:style>
    <style:style style:name="T16" style:family="text">
      <style:text-properties style:font-name-asian="Arial1" style:font-name-complex="Arial1" style:font-size-complex="11pt"/>
    </style:style>
    <style:style style:name="T17" style:family="text">
      <style:text-properties officeooo:rsid="000eaeef" style:font-name-asian="Arial1" style:font-name-complex="Arial1" style:font-size-complex="11pt"/>
    </style:style>
    <style:style style:name="T18" style:family="text">
      <style:text-properties officeooo:rsid="0012c843" style:font-name-asian="Arial1" style:font-name-complex="Arial1" style:font-size-complex="11pt"/>
    </style:style>
    <style:style style:name="T19" style:family="text">
      <style:text-properties officeooo:rsid="0013ec2e" style:font-name-asian="Arial1" style:font-name-complex="Arial1" style:font-size-complex="11pt"/>
    </style:style>
    <style:style style:name="T20" style:family="text">
      <style:text-properties officeooo:rsid="001464b8" style:font-name-asian="Arial1" style:font-name-complex="Arial1" style:font-size-complex="11pt"/>
    </style:style>
    <style:style style:name="T21" style:family="text">
      <style:text-properties officeooo:rsid="00160e89" style:font-name-asian="Arial1" style:font-name-complex="Arial1" style:font-size-complex="11pt"/>
    </style:style>
    <style:style style:name="T22" style:family="text">
      <style:text-properties officeooo:rsid="001b5634" style:font-name-asian="Arial1" style:font-name-complex="Arial1" style:font-size-complex="11pt"/>
    </style:style>
    <style:style style:name="T23" style:family="text">
      <style:text-properties officeooo:rsid="00218755" style:font-name-asian="Arial1" style:font-name-complex="Arial1" style:font-size-complex="11pt"/>
    </style:style>
    <style:style style:name="T24" style:family="text">
      <style:text-properties officeooo:rsid="002574aa" style:font-name-asian="Arial1" style:font-name-complex="Arial1" style:font-size-complex="11pt"/>
    </style:style>
    <style:style style:name="T25" style:family="text">
      <style:text-properties officeooo:rsid="002ebf09" style:font-name-asian="Arial1" style:font-name-complex="Arial1" style:font-size-complex="11pt"/>
    </style:style>
    <style:style style:name="T26" style:family="text">
      <style:text-properties officeooo:rsid="003001e8" style:font-name-asian="Arial1" style:font-name-complex="Arial1" style:font-size-complex="11pt"/>
    </style:style>
    <style:style style:name="T27" style:family="text">
      <style:text-properties officeooo:rsid="002b4f97" style:font-name-asian="Arial1" style:font-name-complex="Arial1" style:font-size-complex="11pt"/>
    </style:style>
    <style:style style:name="T28" style:family="text">
      <style:text-properties officeooo:rsid="0034016f" style:font-name-asian="Arial1" style:font-name-complex="Arial1" style:font-size-complex="11pt"/>
    </style:style>
    <style:style style:name="T29" style:family="text">
      <style:text-properties officeooo:rsid="0034d367" style:font-name-asian="Arial1" style:font-name-complex="Arial1" style:font-size-complex="11pt"/>
    </style:style>
    <style:style style:name="T30" style:family="text">
      <style:text-properties fo:color="#000000" loext:opacity="100%">
        <loext:char-complex-color loext:theme-type="dark1" loext:color-type="theme"/>
      </style:text-properties>
    </style:style>
    <style:style style:name="T31" style:family="text">
      <style:text-properties fo:color="#000000" loext:opacity="100%" style:font-weight-complex="bold">
        <loext:char-complex-color loext:theme-type="dark1" loext:color-type="theme"/>
      </style:text-properties>
    </style:style>
    <style:style style:name="T32" style:family="text">
      <style:text-properties fo:color="#000000" loext:opacity="100%" officeooo:rsid="001699cd">
        <loext:char-complex-color loext:theme-type="dark1" loext:color-type="theme"/>
      </style:text-properties>
    </style:style>
    <style:style style:name="T33" style:family="text">
      <style:text-properties fo:color="#000000" loext:opacity="100%" officeooo:rsid="003001e8" style:font-name-asian="Arial1" style:font-name-complex="Arial1" style:font-size-complex="11pt">
        <loext:char-complex-color loext:theme-type="dark1" loext:color-type="theme"/>
      </style:text-properties>
    </style:style>
    <style:style style:name="T34" style:family="text">
      <style:text-properties fo:color="#000000" loext:opacity="100%" officeooo:rsid="002820ce">
        <loext:char-complex-color loext:theme-type="dark1" loext:color-type="theme"/>
      </style:text-properties>
    </style:style>
    <style:style style:name="T35" style:family="text">
      <style:text-properties fo:language="fr" fo:country="CH" fo:font-weight="bold" style:font-weight-asian="bold" style:font-weight-complex="bold"/>
    </style:style>
    <style:style style:name="T36" style:family="text">
      <style:text-properties fo:language="fr" fo:country="CH" fo:font-weight="bold" officeooo:rsid="002574aa" style:font-weight-asian="bold" style:font-weight-complex="bold"/>
    </style:style>
    <style:style style:name="T37" style:family="text">
      <style:text-properties fo:language="fr" fo:country="FR" fo:font-weight="normal" style:font-weight-asian="normal" style:font-name-complex="Arial1" style:font-weight-complex="normal"/>
    </style:style>
    <style:style style:name="T38" style:family="text">
      <style:text-properties officeooo:rsid="002820ce"/>
    </style:style>
    <style:style style:name="T39" style:family="text">
      <style:text-properties officeooo:rsid="00289d0c"/>
    </style:style>
    <style:style style:name="T40" style:family="text">
      <style:text-properties officeooo:rsid="000eaeef"/>
    </style:style>
    <style:style style:name="T41" style:family="text">
      <style:text-properties officeooo:rsid="0028ad5b"/>
    </style:style>
    <style:style style:name="T42" style:family="text">
      <style:text-properties officeooo:rsid="002a2679"/>
    </style:style>
    <style:style style:name="T43" style:family="text">
      <style:text-properties officeooo:rsid="002b4f97"/>
    </style:style>
    <style:style style:name="T44" style:family="text">
      <style:text-properties officeooo:rsid="003001e8"/>
    </style:style>
    <style:style style:name="T45" style:family="text">
      <style:text-properties fo:color="#0000ff" loext:opacity="100%"/>
    </style:style>
    <style:style style:name="T46" style:family="text">
      <style:text-properties fo:color="#0000ff" loext:opacity="100%" style:font-name-asian="Arial1" style:font-name-complex="Arial1" style:font-size-complex="11pt"/>
    </style:style>
    <style:style style:name="T47" style:family="text">
      <style:text-properties fo:color="#0000ff" loext:opacity="100%" officeooo:rsid="003001e8" style:font-name-asian="Arial1" style:font-name-complex="Arial1" style:font-size-complex="11pt"/>
    </style:style>
    <style:style style:name="T48" style:family="text">
      <style:text-properties officeooo:rsid="0034016f"/>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7" loext:marker-style-name="T4"/>
        <text:p text:style-name="P30" loext:marker-style-name="T9"><text:bookmark-start text:name="Texte10"/><text:bookmark-start text:name="Texte9 Copy 1"/><field:fieldmark-start text:name="Texte9" field:type="vnd.oasis.opendocument.field.FORMTEXT"><field:param field:name="Content" field:value="Mini Projet AMC"/><field:param field:name="Format" field:value="Première lettre des mots en maj."/></field:fieldmark-start><field:fieldmark-separator/><text:span text:style-name="T9">Mini Projet AMC</text:span><field:fieldmark-end/><text:bookmark-end text:name="Texte9 Copy 1"/><text:span text:style-name="T9"> </text:span><text:bookmark-end text:name="Texte10"/><text:span text:style-name="T9"><text:line-break/></text:span></text:p>
        <text:p text:style-name="P37" loext:marker-style-name="T10"><text:span text:style-name="T10">ACCELEROMETER GAME </text:span></text:p>
      </text:section>
      <text:section text:style-name="Sect1" text:name="Section1">
        <text:p text:style-name="P38" loext:marker-style-name="T4"><text:span text:style-name="T4"><text:tab/></text:span></text:p>
        <text:p text:style-name="P35"/>
        <text:p text:style-name="P31"><text:span text:style-name="T4">Type de projet :</text:span></text:p>
        <text:p text:style-name="P33"><text:span text:style-name="T40">Solo</text:span></text:p>
        <text:p text:style-name="P28"/>
        <text:p text:style-name="P31"><text:span text:style-name="T4">Nom(s) Prénom(s) :</text:span></text:p>
        <text:p text:style-name="P32"><text:span text:style-name="T13">Seite Alexander</text:span><text:span text:style-name="T13"/></text:p>
        <text:p text:style-name="P32"><text:span text:style-name="T14"/></text:p>
        <text:p text:style-name="P49">Ce cahier des charges comprend deux projets différents :</text:p>
        <text:p text:style-name="P49">proposition 1 sur Fig. 1 / proposition 2 sur Fig. 2.</text:p>
        <text:p text:style-name="P46"/>
        <text:p text:style-name="P45" loext:marker-style-name="T15"><draw:frame draw:style-name="fr2" draw:name="Image3" text:anchor-type="char" svg:x="4.165cm" svg:y="0.376cm" svg:width="9.543cm" svg:height="5.923cm" draw:z-index="9"><draw:image xlink:href="Pictures/10000001000005190000032AA594795B.png" xlink:type="simple" xlink:show="embed" xlink:actuate="onLoad" draw:mime-type="image/png"/></draw:frame><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8"/>
        <text:p text:style-name="P45" loext:marker-style-name="T15"><text:span text:style-name="T4"/></text:p>
        <text:p text:style-name="P46"/>
        <text:p text:style-name="P46"/>
        <text:p text:style-name="P50">Fig. 1. Jeu du labyrinthe (déplacement de bille par inclinaison du plateau<text:span text:style-name="T41">)</text:span></text:p>
        <text:p text:style-name="P45" loext:marker-style-name="T15"/>
        <text:p text:style-name="P45" loext:marker-style-name="T15"><draw:frame draw:style-name="fr2" draw:name="Image2" text:anchor-type="char" svg:x="4.852cm" svg:y="0.173cm" svg:width="8.183cm" svg:height="6.578cm" draw:z-index="8"><draw:image xlink:href="Pictures/10000001000003CE0000030F8B6BF19E.png" xlink:type="simple" xlink:show="embed" xlink:actuate="onLoad" draw:mime-type="image/png"/></draw:frame><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5" loext:marker-style-name="T15"><text:span text:style-name="T4"/></text:p>
        <text:p text:style-name="P49">Fig. 2. L’iconique jeu pong</text:p>
        <text:p text:style-name="P49"/>
        <text:p text:style-name="P51" loext:marker-style-name="T15"><text:span text:style-name="T43">Les deux propositions s’inspirent de jeux connus. Dans chacun des cas, l’idée est de reproduire leur gameplay au travers une intégration d’un accéléromètre.</text:span></text:p>
        <text:p text:style-name="P31"><text:soft-page-break/><text:span text:style-name="T5">PROPOSITION 1</text:span></text:p>
        <text:p text:style-name="P31"><text:span text:style-name="T5"/></text:p>
        <text:p text:style-name="P31"><text:span text:style-name="T5"/></text:p>
        <text:p text:style-name="P47" loext:marker-style-name="T4">Nom du projet : <text:tab/><text:span text:style-name="T23">LABIRINTO</text:span></text:p>
        <text:p text:style-name="P47" loext:marker-style-name="T4"><text:span text:style-name="T23"/></text:p>
        <text:p text:style-name="P39" loext:marker-style-name="T4"><text:span text:style-name="T8">Objectif du projet : <text:s/></text:span></text:p>
        <text:p text:style-name="P2"><text:span text:style-name="T17">D</text:span><text:span text:style-name="T18">évelopper</text:span><text:span text:style-name="T17"> </text:span><text:span text:style-name="T16">un </text:span><text:span text:style-name="T18">jeu dans le cadre d’une application </text:span><text:span text:style-name="T16">Kivy. </text:span><text:span text:style-name="T18">L’application d</text:span><text:span text:style-name="T19">onne accès aux données de l’accéléromètre du dispositif Android avec lequel il contrôle une bille dans un espace en 3D simplifié. L’objectif est de simuler la gravité appliquée à une masse virtuelle offrant deux libertés au joueur. La première est de déplacer la bille en fonction de l’inclinaison de l’appareil (X, Y). La seconde est de faire sauter la bille avec un mouvement brusque vers le haut (Z). </text:span></text:p>
        <text:p text:style-name="P2"><text:span text:style-name="T19"/></text:p>
        <text:p text:style-name="P2"><text:span text:style-name="T19">L</text:span><text:span text:style-name="T20">a bille </text:span><text:span text:style-name="T24">doit être représentée par un </text:span><text:span text:style-name="T20">simple </text:span><text:span text:style-name="T24">disque sans effets ajoutés (raycasting, etc). Le disque</text:span><text:span text:style-name="T20"> grossit pour simuler son déplacement en Z. La mécanique de ses déplacements doit pouvoir donner une impression de continuité. </text:span><text:span text:style-name="T19">Le jeu comporte </text:span><text:span text:style-name="T20">un niveau de référence.</text:span><text:span text:style-name="T19"> Un niveau se complète lorsque la bille atteint un point donné sur la map. </text:span><text:span text:style-name="T20">La map est donnée par un fichier de configuration qui permet de définir un obstacle et sa hauteur, un </text:span><text:span text:style-name="T22">objet (malus/bonus)</text:span><text:span text:style-name="T20">, la position de départ du joueur, ses positions libres et son objectif. </text:span><text:span text:style-name="T26">Integrer un environnement sonore au contact des objets.</text:span></text:p>
        <text:p text:style-name="P2"><text:span text:style-name="T20"/></text:p>
        <text:p text:style-name="P58"><text:span text:style-name="T16">Si le temps le permet : photo automatique à la victoire. Cette dernière serait assignée au niveau correspondant. </text:span></text:p>
        <text:p text:style-name="P52" loext:marker-style-name="T31"/>
        <text:p text:style-name="P57"><text:span text:style-name="T3">Liste des tâches :</text:span></text:p>
        <text:p text:style-name="P34"><text:span text:style-name="T7"><text:tab/></text:span><text:span text:style-name="T6">Développement sandbox</text:span></text:p>
        <text:list text:style-name="WWNum16">
          <text:list-item text:start-value="1">
            <text:p text:style-name="P7">Concevoir l'architecture de l'application et l'interface graphique principale (<text:span text:style-name="T38">launching menu, layouts, etc)</text:span></text:p>
          </text:list-item>
          <text:list-item>
            <text:p text:style-name="P12">Afficher la bille dans un fond uniforme</text:p>
          </text:list-item>
          <text:list-item>
            <text:p text:style-name="P14"><text:span text:style-name="T32">Développer </text:span><text:span text:style-name="T34">l’algorithme de déplacement de la bille</text:span></text:p>
          </text:list-item>
          <text:list-item>
            <text:p text:style-name="P20"><text:span text:style-name="T30">Implémenter collisions</text:span></text:p>
          </text:list-item>
          <text:list-item>
            <text:p text:style-name="P20"><text:span text:style-name="T30">Implémentation sortie de niveau (victoire si arrivé au point A / défaite si point B ...)</text:span></text:p>
          </text:list-item>
          <text:list-item>
            <text:p text:style-name="P20">Implémenter le clic de souris pour guider la bille (facilitation des tests sur ordinateur)</text:p>
          </text:list-item>
          <text:list-item>
            <text:p text:style-name="P20">Développer le « parseur » du fichier de configuration</text:p>
          </text:list-item>
          <text:list-item>
            <text:p text:style-name="P20">Implémentation graphique d’une <text:span text:style-name="T39">map complète (pos. Init. / murs / trous / pos. d’arrivée)</text:span></text:p>
          </text:list-item>
        </text:list>
        <text:p text:style-name="P23"/>
        <text:p text:style-name="P23"/>
        <text:p text:style-name="P18">Implémentation sur tablette</text:p>
        <text:list text:continue-numbering="true" text:style-name="WWNum16">
          <text:list-item>
            <text:p text:style-name="P8">Implémenter la lecture de l'accéléromètre avec Kivy.</text:p>
          </text:list-item>
          <text:list-item>
            <text:p text:style-name="P8"><text:span text:style-name="T42">T</text:span>ester l'acquisition des données brutes sur tablette.</text:p>
          </text:list-item>
          <text:list-item>
            <text:p text:style-name="P7">Générer le fichier .apk et tester l'application finale sur tablette Android.</text:p>
          </text:list-item>
          <text:list-item>
            <text:p text:style-name="P7">Rédiger le fichier README.md et mettre à jour le cahier des charges sur gitedu.</text:p>
          </text:list-item>
          <text:list-item>
            <text:p text:style-name="P7">Créer la vidéo de présentation de l'application et la rendre sur tube.switch.</text:p>
          </text:list-item>
        </text:list>
        <text:p text:style-name="P17"/>
        <text:p text:style-name="P40" loext:marker-style-name="T35"><text:span text:style-name="T35">Capteur utilisé dans l’application :</text:span></text:p>
        <text:p text:style-name="P58"><text:span text:style-name="T16">Accéléromètre, écran résistif, </text:span><text:span text:style-name="T25">haut-parleur</text:span></text:p>
        <text:p text:style-name="P52" loext:marker-style-name="T31"/>
        <text:p text:style-name="P40" loext:marker-style-name="T35"><text:span text:style-name="T35">Principales fonctionnalités utilisées dans ce projet qui n’ont pas été étudiées/testées jusqu’ici dans le cours :</text:span></text:p>
        <text:list text:continue-numbering="true" text:style-name="WWNum16">
          <text:list-item>
            <text:p text:style-name="P24"><text:span text:style-name="T16">Programmation graphique avec implémentation de dynamique physique [1]</text:span></text:p>
          </text:list-item>
          <text:list-item>
            <text:p text:style-name="P24">Génération de son [2]</text:p>
          </text:list-item>
        </text:list>
        <text:p text:style-name="P10"/>
        <text:p text:style-name="P16"/>
        <text:p text:style-name="P54"><text:soft-page-break/><text:span text:style-name="T3">PROPOSITION 2</text:span></text:p>
        <text:p text:style-name="P54"><text:span text:style-name="T3"/></text:p>
        <text:p text:style-name="P54"><text:span text:style-name="T3"/></text:p>
        <text:p text:style-name="P55"><text:span text:style-name="T3">Nom du projet :<text:tab/>GRAVITY PONG</text:span></text:p>
        <text:p text:style-name="P54"><text:span text:style-name="T3"/></text:p>
        <text:p text:style-name="P42" loext:marker-style-name="T4"><text:span text:style-name="T8">Objectif du projet : </text:span></text:p>
        <text:p text:style-name="P42"><text:span text:style-name="T17">D</text:span><text:span text:style-name="T18">évelopper</text:span><text:span text:style-name="T17"> </text:span><text:span text:style-name="T21">le jeu</text:span><text:span text:style-name="T18"> « </text:span><text:span text:style-name="T21">Pong » revisité </text:span><text:span text:style-name="T18">dans le cadre d’une application </text:span><text:span text:style-name="T16">Kivy. </text:span><text:span text:style-name="T18">L’application d</text:span><text:span text:style-name="T19">onne accès aux données de l’accéléromètre du dispositif Android avec lequel </text:span><text:span text:style-name="T21">l’utilisateur </text:span><text:span text:style-name="T19">contrôle </text:span><text:span text:style-name="T21">une plateforme</text:span><text:span text:style-name="T19"> </text:span><text:span text:style-name="T21">e</text:span><text:span text:style-name="T19">n fonction de l’inclinaison de l’appareil (X, Y). </text:span><text:span text:style-name="T21">L’objectif</text:span><text:span text:style-name="T19"> est de déplacer </text:span><text:span text:style-name="T21">la plateforme afin de renvoyer une </text:span><text:span text:style-name="T19">bille, </text:span><text:span text:style-name="T21">en déplacement continu, dans le camps adverse. Le camps adverse est contrôlé par un bot pour un mode « solo ». </text:span><text:span text:style-name="T33">Son au contact des objets.</text:span></text:p>
        <text:p text:style-name="P42"><text:span text:style-name="T32"/></text:p>
        <text:p text:style-name="P29"><text:span text:style-name="T3">Liste des tâches :</text:span> </text:p>
        <text:list text:continue-numbering="true" text:style-name="WWNum16">
          <text:list-header>
            <text:p text:style-name="P36"><text:span text:style-name="T6">Développement sandbox</text:span></text:p>
          </text:list-header>
          <text:list-item text:start-value="1">
            <text:p text:style-name="P9">Concevoir l'architecture de l'application et l'interface graphique principale (<text:span text:style-name="T38">launching menu, layouts, etc)</text:span></text:p>
          </text:list-item>
          <text:list-item>
            <text:p text:style-name="P13">Afficher la bille dans un fond uniforme</text:p>
          </text:list-item>
          <text:list-item>
            <text:p text:style-name="P15"><text:span text:style-name="T32">Développer </text:span><text:span text:style-name="T34">l’algorithme de déplacement de la bille</text:span></text:p>
          </text:list-item>
          <text:list-item>
            <text:p text:style-name="P21"><text:span text:style-name="T30">Implémenter collisions</text:span></text:p>
          </text:list-item>
          <text:list-item>
            <text:p text:style-name="P21"><text:span text:style-name="T30">Implémentation sortie de niveau (victoire si arrivé au point A / défaite si point B ...)</text:span></text:p>
          </text:list-item>
          <text:list-item>
            <text:p text:style-name="P21">Implémenter le clic de souris pour guider la bille (facilitation des tests sur ordinateur</text:p>
          </text:list-item>
          <text:list-item>
            <text:p text:style-name="P26">Développement du bot adverse</text:p>
            <text:p text:style-name="P22"/>
            <text:p text:style-name="P19">Implémentation sur tablette</text:p>
          </text:list-item>
          <text:list-item>
            <text:p text:style-name="P9">Implémenter la lecture de l'accéléromètre avec Kivy.</text:p>
          </text:list-item>
          <text:list-item>
            <text:p text:style-name="P9"><text:span text:style-name="T42">T</text:span>ester l'acquisition des données brutes sur tablette.</text:p>
          </text:list-item>
          <text:list-item>
            <text:p text:style-name="P9">Générer le fichier .apk et tester l'application finale sur tablette Android.</text:p>
          </text:list-item>
          <text:list-item>
            <text:p text:style-name="P9">Rédiger le fichier README.md et mettre à jour le cahier des charges sur gitedu.</text:p>
          </text:list-item>
          <text:list-item>
            <text:p text:style-name="P9">Créer la vidéo de présentation de l'application et la rendre sur tube.switch..</text:p>
          </text:list-item>
        </text:list>
        <text:p text:style-name="P11"/>
        <text:p text:style-name="P42" loext:marker-style-name="T35"><text:span text:style-name="T35">Capteur utilisé dans l’application </text:span><text:span text:style-name="T36">(1)</text:span><text:span text:style-name="T35">:</text:span></text:p>
        <text:list text:continue-numbering="true" text:style-name="WWNum16">
          <text:list-item>
            <text:p text:style-name="P25"><text:span text:style-name="T16">Programmation graphique avec implémentation de dynamique physique [1]</text:span></text:p>
          </text:list-item>
          <text:list-item>
            <text:p text:style-name="P25"><text:span text:style-name="T16">Génération de son [2]</text:span></text:p>
          </text:list-item>
        </text:list>
        <text:p text:style-name="P53" loext:marker-style-name="T31"/>
        <text:p text:style-name="P44" loext:marker-style-name="T35"><text:span text:style-name="T35">Principales fonctionnalités utilisées dans ce projet qui n’ont pas été étudiées/testées jusqu’ici dans le cours :</text:span></text:p>
        <text:p text:style-name="P44" loext:marker-style-name="T35"><text:span text:style-name="T27">Accéléromètre, écran résistif, </text:span><text:span text:style-name="T25">haut-parleur</text:span></text:p>
        <text:p text:style-name="P41" loext:marker-style-name="T35"><text:span text:style-name="T35">Références :</text:span></text:p>
        <text:p text:style-name="P59"><text:span text:style-name="T16">[1]<text:tab/></text:span><text:span text:style-name="T26">Kivy 2.3.1 documentation, </text:span><text:span text:style-name="T16">« Tutorials » Pong Game Tutorial</text:span><text:span text:style-name="T26">, <text:s/></text:span></text:p>
        <text:p text:style-name="P59"><text:span text:style-name="T26"><text:tab/></text:span><text:span text:style-name="T47">k</text:span><text:span text:style-name="T46">ivy.org/doc/stable/tutorials/pong.html</text:span><text:span text:style-name="T16"> </text:span><text:span text:style-name="T26">(consulté le 10 mai 2026)</text:span></text:p>
        <text:p text:style-name="P60"><text:span text:style-name="T16">[2]<text:tab/></text:span><text:span text:style-name="T29">L</text:span><text:span text:style-name="T28">inuxtut, </text:span>Expliquez en détail comment créer un son avec python</text:p>
        <text:p text:style-name="P56"><text:tab/><text:a xlink:type="simple" xlink:href="https://linuxtut.com/fr/3bbf34911f6e43ee14a3/" text:style-name="Internet_20_link" text:visited-style-name="Visited_20_Internet_20_Link">https://linuxtut.com/fr/3bbf34911f6e43ee14a3/</text:a><text:span text:style-name="T45"> </text:span><text:span text:style-name="T48">(consulté le 10 mai 2026)</text:span></text:p>
        <text:p text:style-name="P56"><text:span text:style-name="T48">[</text:span>3]<text:tab/>« Screen Manager — Kivy 2.3.0 documentation ». https://kivy.org/doc/stable/api-kivy.uix.screenmanager.html (consulté le 27 avril 2026).</text:p>
        <text:p text:style-name="P3" loext:marker-style-name="T3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fr" fo:country="CH" style:letter-kerning="false" style:font-name-asian="Times New Roman1" style:font-size-asian="10pt" style:language-asian="fr"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CH" style:letter-kerning="false" style:font-name-asian="Times New Roman1" style:font-size-asian="10pt" style:language-asian="fr" style:country-asian="CH"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vertical-align="baseline" style:writing-mode="lr-tb"/>
      <style:text-properties style:font-name="Arial" fo:font-family="Arial" style:font-family-generic="roman" style:font-pitch="variable" fo:font-size="11pt" fo:language="fr" fo:country="FR" style:font-size-asian="11pt" style:language-asian="fr" style:country-asian="FR" fo:hyphenate="false" fo:hyphenation-remain-char-count="2" fo:hyphenation-push-char-count="2" loext:hyphenation-no-caps="tru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0.06cm" fo:margin-top="0.212cm" fo:margin-bottom="0.212cm" style:contextual-spacing="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variant="small-caps" fo:font-size="10pt" fo:font-weight="bold" style:font-size-asian="10pt" style:font-weight-asian="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variant="small-cap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101cm" fo:margin-top="0cm" fo:margin-bottom="0.106cm" style:contextual-spacing="false">
        <style:tab-stops>
          <style:tab-stop style:position="0.801cm"/>
        </style:tab-stops>
      </style:paragraph-properties>
      <style:text-properties fo:font-size="10pt" style:font-size-asian="10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ylepuce1" style:family="paragraph" style:parent-style-name="Standard" style:list-style-name="WWNum4"/>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cm" style:contextual-spacing="true"/>
    </style:style>
    <style:style style:name="Bibliographie1" style:family="paragraph" style:parent-style-name="Standard" loext:linked-style-name="Bibliography_20_Car">
      <style:paragraph-properties fo:margin-left="0.677cm" fo:margin-top="0.106cm" fo:margin-bottom="0cm" style:contextual-spacing="false" fo:text-align="justify" style:justify-single-word="false" fo:text-indent="-0.677cm" style:auto-text-indent="false">
        <style:tab-stops>
          <style:tab-stop style:position="0.67cm"/>
        </style:tab-stops>
      </style:paragraph-properties>
      <style:text-properties fo:language="fr" fo:country="CH"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loext:linked-style-name="Header">
      <style:text-properties style:font-name="Arial" fo:font-family="Arial" style:font-family-generic="roman" style:font-pitch="variable" fo:font-size="11pt" fo:language="fr" fo:country="FR" style:font-size-asian="11pt" style:language-asian="fr" style:country-asian="FR"/>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Bibliography_20_Car" style:display-name="Bibliography Car" style:family="text" style:parent-style-name="Default_20_Paragraph_20_Font" loext:linked-style-name="Bibliographie1">
      <style:text-properties style:font-name="Arial" fo:font-family="Arial" style:font-family-generic="roman" style:font-pitch="variable" fo:font-size="11pt" fo:font-weight="bold" style:font-size-asian="11pt" style:language-asian="fr" style:country-asian="FR"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style style:name="ListLabel_20_48" style:display-name="ListLabel 4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36cm" fo:text-indent="-0.6cm" fo:margin-left="0.7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text:list-tab-stop-position="2.641cm" fo:text-indent="-0.635cm" fo:margin-left="2.641cm"/>
        </style:list-level-properties>
        <style:text-properties fo:font-family="'Courier New'"/>
      </text:list-level-style-bullet>
      <text:list-level-style-bullet text:level="3" text:style-name="ListLabel_20_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Wingdings"/>
      </text:list-level-style-bullet>
      <text:list-level-style-bullet text:level="4" text:style-name="ListLabel_20_6"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
      </text:list-level-style-bullet>
      <text:list-level-style-bullet text:level="5" text:style-name="ListLabel_20_7" loext:num-list-format="o" style:num-suffix="o" text:bullet-char="o">
        <style:list-level-properties text:list-level-position-and-space-mode="label-alignment">
          <style:list-level-label-alignment text:label-followed-by="listtab" text:list-tab-stop-position="6.451cm" fo:text-indent="-0.635cm" fo:margin-left="6.451cm"/>
        </style:list-level-properties>
        <style:text-properties fo:font-family="'Courier New'"/>
      </text:list-level-style-bullet>
      <text:list-level-style-bullet text:level="6" text:style-name="ListLabel_20_8" loext:num-list-format="" style:num-suffix="" text:bullet-char="">
        <style:list-level-properties text:list-level-position-and-space-mode="label-alignment">
          <style:list-level-label-alignment text:label-followed-by="listtab" text:list-tab-stop-position="7.721cm" fo:text-indent="-0.635cm" fo:margin-left="7.721cm"/>
        </style:list-level-properties>
        <style:text-properties style:font-name="Wingdings"/>
      </text:list-level-style-bullet>
      <text:list-level-style-bullet text:level="7" text:style-name="ListLabel_20_9" loext:num-list-format="" style:num-suffix="" text:bullet-char="">
        <style:list-level-properties text:list-level-position-and-space-mode="label-alignment">
          <style:list-level-label-alignment text:label-followed-by="listtab" text:list-tab-stop-position="8.991cm" fo:text-indent="-0.635cm" fo:margin-left="8.991cm"/>
        </style:list-level-properties>
        <style:text-properties style:font-name="Symbol"/>
      </text:list-level-style-bullet>
      <text:list-level-style-bullet text:level="8" text:style-name="ListLabel_20_10" loext:num-list-format="o" style:num-suffix="o" text:bullet-char="o">
        <style:list-level-properties text:list-level-position-and-space-mode="label-alignment">
          <style:list-level-label-alignment text:label-followed-by="listtab" text:list-tab-stop-position="10.261cm" fo:text-indent="-0.635cm" fo:margin-left="10.261cm"/>
        </style:list-level-properties>
        <style:text-properties fo:font-family="'Courier New'"/>
      </text:list-level-style-bullet>
      <text:list-level-style-bullet text:level="9" text:style-name="ListLabel_20_11" loext:num-list-format="" style:num-suffix="" text:bullet-char="">
        <style:list-level-properties text:list-level-position-and-space-mode="label-alignment">
          <style:list-level-label-alignment text:label-followed-by="listtab" text:list-tab-stop-position="11.531cm" fo:text-indent="-0.635cm" fo:margin-left="11.5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ListLabel_20_1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1.401cm" fo:text-indent="-0.7cm" fo:margin-left="1.401cm"/>
        </style:list-level-properties>
        <style:text-properties style:font-name="Symbol"/>
      </text:list-level-style-bullet>
      <text:list-level-style-bullet text:level="2" text:style-name="ListLabel_20_22" loext:num-list-format="o" style:num-suffix="o" text:bullet-char="o">
        <style:list-level-properties text:list-level-position-and-space-mode="label-alignment">
          <style:list-level-label-alignment text:label-followed-by="listtab" text:list-tab-stop-position="3.24cm" fo:text-indent="-0.635cm" fo:margin-left="3.24cm"/>
        </style:list-level-properties>
        <style:text-properties fo:font-family="'Courier New'"/>
      </text:list-level-style-bullet>
      <text:list-level-style-bullet text:level="3" text:style-name="ListLabel_20_23" loext:num-list-format=""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ListLabel_20_25" loext:num-list-format="o" style:num-suffix="o" text:bullet-char="o">
        <style:list-level-properties text:list-level-position-and-space-mode="label-alignment">
          <style:list-level-label-alignment text:label-followed-by="listtab" text:list-tab-stop-position="7.05cm" fo:text-indent="-0.635cm" fo:margin-left="7.05cm"/>
        </style:list-level-properties>
        <style:text-properties fo:font-family="'Courier New'"/>
      </text:list-level-style-bullet>
      <text:list-level-style-bullet text:level="6" text:style-name="ListLabel_20_26" loext:num-list-format=""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text:list-tab-stop-position="10.86cm" fo:text-indent="-0.635cm" fo:margin-left="10.86cm"/>
        </style:list-level-properties>
        <style:text-properties fo:font-family="'Courier New'"/>
      </text:list-level-style-bullet>
      <text:list-level-style-bullet text:level="9" text:style-name="ListLabel_20_29" loext:num-list-format=""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2.341cm" fo:text-indent="-0.501cm" fo:margin-left="2.406cm"/>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text:list-tab-stop-position="2.341cm" fo:text-indent="-0.501cm" fo:margin-left="2.406cm"/>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4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4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7" loext:num-list-format="" style:num-suffix="" text:bullet-char="">
        <style:list-level-properties text:list-level-position-and-space-mode="label-alignment">
          <style:list-level-label-alignment text:label-followed-by="listtab" fo:text-indent="-0.635cm" fo:margin-left="-1.249cm"/>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635cm" fo:margin-left="0.021cm"/>
        </style:list-level-properties>
        <style:text-properties fo:font-family="'Courier New'"/>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635cm" fo:margin-left="1.291cm"/>
        </style:list-level-properties>
        <style:text-properties style:font-name="Wingdings"/>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635cm" fo:margin-left="2.561cm"/>
        </style:list-level-properties>
        <style:text-properties style:font-name="Symbol"/>
      </text:list-level-style-bullet>
      <text:list-level-style-bullet text:level="5" text:style-name="ListLabel_20_61" loext:num-list-format="o" style:num-suffix="o" text:bullet-char="o">
        <style:list-level-properties text:list-level-position-and-space-mode="label-alignment">
          <style:list-level-label-alignment text:label-followed-by="listtab" fo:text-indent="-0.635cm" fo:margin-left="3.831cm"/>
        </style:list-level-properties>
        <style:text-properties fo:font-family="'Courier New'"/>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635cm" fo:margin-left="5.101cm"/>
        </style:list-level-properties>
        <style:text-properties style:font-name="Wingdings"/>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635cm" fo:margin-left="6.371cm"/>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fo:text-indent="-0.635cm" fo:margin-left="7.641cm"/>
        </style:list-level-properties>
        <style:text-properties fo:font-family="'Courier New'"/>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635cm" fo:margin-left="8.9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fo:text-indent="-0.635cm" fo:margin-left="1.298cm"/>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635cm" fo:margin-left="2.568cm"/>
        </style:list-level-properties>
        <style:text-properties fo:font-family="'Courier New'"/>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635cm" fo:margin-left="3.838cm"/>
        </style:list-level-properties>
        <style:text-properties style:font-name="Wingdings"/>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635cm" fo:margin-left="5.108cm"/>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635cm" fo:margin-left="6.378cm"/>
        </style:list-level-properties>
        <style:text-properties fo:font-family="'Courier New'"/>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635cm" fo:margin-left="7.648cm"/>
        </style:list-level-properties>
        <style:text-properties style:font-name="Wingdings"/>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635cm" fo:margin-left="8.918cm"/>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635cm" fo:margin-left="10.188cm"/>
        </style:list-level-properties>
        <style:text-properties fo:font-family="'Courier New'"/>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635cm" fo:margin-left="11.4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5"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76"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79"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2"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9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1"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1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left="-1cm" fo:margin-top="0.106cm" fo:margin-bottom="0cm" style:contextual-spacing="false">
        <style:tab-stops>
          <style:tab-stop style:position="8.001cm" style:type="center"/>
          <style:tab-stop style:position="17.002cm" style:type="right"/>
        </style:tab-stops>
      </style:paragraph-properties>
    </style:style>
    <style:style style:name="MP2" style:family="paragraph" style:parent-style-name="Header">
      <style:paragraph-properties fo:margin-top="0cm" fo:margin-bottom="0.106cm" style:contextual-spacing="false">
        <style:tab-stops>
          <style:tab-stop style:position="8.001cm" style:type="center"/>
          <style:tab-stop style:position="17.002cm" style:type="right"/>
        </style:tab-stops>
      </style:paragraph-properties>
    </style:style>
    <style:style style:name="MP3" style:family="paragraph" style:parent-style-name="Footer">
      <style:paragraph-properties fo:margin-left="-1.251cm" fo:margin-right="0.635cm">
        <style:tab-stops>
          <style:tab-stop style:position="8.001cm" style:type="center"/>
        </style:tab-stops>
      </style:paragraph-properties>
      <style:text-properties style:font-name="Arial Narrow" fo:font-size="8pt" style:font-size-asian="8pt" style:font-size-complex="8pt"/>
    </style:style>
    <style:style style:name="MP4" style:family="paragraph" style:parent-style-name="Footer">
      <style:paragraph-properties fo:padding="0cm" fo:border="none"/>
    </style:style>
    <style:style style:name="MT1" style:family="text">
      <style:text-properties fo:font-size="12pt" fo:font-weight="bold" style:font-size-asian="12pt" style:font-weight-asian="bold" style:font-weight-complex="bold"/>
    </style:style>
    <style:style style:name="MT2" style:family="text">
      <style:text-properties style:font-name="Arial Narrow"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801cm" fo:margin-bottom="0.8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cm" fo:margin-left="0cm" fo:margin-right="0cm" fo:margin-bottom="2.099cm" style:dynamic-spacing="true"/>
      </style:header-style>
      <style:footer-style>
        <style:header-footer-properties fo:min-height="0.7cm" fo:margin-left="0cm" fo:margin-right="0cm" fo:margin-top="0.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 text:anchor-type="as-char" svg:width="4.369cm" svg:height="1.097cm" draw:z-index="3"><draw:image xlink:href="Pictures/100000000000040A0000010758031FF2.jpg" xlink:type="simple" xlink:show="embed" xlink:actuate="onLoad" draw:mime-type="image/jpeg"/><svg:desc>LOGO_hepia_P</svg:desc></draw:frame><text:tab/><text:tab/><text:span text:style-name="MT1">Année 2026</text:span></text:p>
        <text:p text:style-name="MP2" loext:marker-style-name="MT1"><text:span text:style-name="MT1"><text:tab/><text:tab/>Cours AMC</text:span><text:span text:style-name="MT1"/></text:p>
      </style:header>
      <style:footer>
        <text:p text:style-name="MP3" loext:marker-style-name="MT2"><draw:frame draw:style-name="Mfr2" draw:name="Frame2" text:anchor-type="paragraph" svg:y="0.002cm" draw:z-index="7"><draw:text-box fo:min-height="0.041cm" fo:min-width="0.041cm"><text:p text:style-name="MP4"><text:span text:style-name="Page_20_Number"><text:page-number text:select-page="current">4</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ormulaire</dc:title>
    <dc:subject>Projet de semestre</dc:subject>
    <meta:initial-creator>Eric Zumbrunnen;Madeleine Buchs</meta:initial-creator>
    <meta:editing-cycles>267</meta:editing-cycles>
    <meta:print-date>2016-04-25T07:47:00</meta:print-date>
    <meta:creation-date>2016-04-25T07:32:00</meta:creation-date>
    <dc:date>2026-05-10T10:38:04.637684797</dc:date>
    <meta:editing-duration>PT22H45M19S</meta:editing-duration>
    <meta:generator>LibreOffice/24.2.7.2$Linux_X86_64 LibreOffice_project/420$Build-2</meta:generator>
    <meta:document-statistic meta:table-count="0" meta:image-count="3" meta:object-count="0" meta:page-count="4" meta:paragraph-count="73" meta:word-count="788" meta:character-count="5031" meta:non-whitespace-character-count="4325"/>
    <meta:user-defined meta:name="AppVersion">16.0000</meta:user-defined>
    <meta:user-defined meta:name="Company">Ecole d'ingénieurs de Genève</meta:user-defined>
    <meta:user-defined meta:name="ZOTERO_PREF_1">&lt;data data-version="3" zotero-version="6.0.26"&gt;&lt;session id="hSpD1v2D"/&gt;&lt;style id="http://www.zotero.org/styles/ieee" locale="fr-FR" hasBibliography="1" bibliographyStyleHasBeenSet="1"/&gt;&lt;prefs&gt;&lt;pref name="fieldType" value="Field"/&gt;&lt;pref name="automaticJour</meta:user-defined>
    <meta:user-defined meta:name="ZOTERO_PREF_2">nalAbbreviations" value="true"/&gt;&lt;/prefs&gt;&lt;/data&gt;</meta:user-defined>
    <meta:template xlink:type="simple" xlink:actuate="onRequest" xlink:title="Normal.dotm" xlink:href=""/>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TextBox1_Change()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